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text" style:name="a390">
      <style:text-properties fo:font-variant="normal" fo:text-transform="none" fo:color="#caeefb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61ec" draw:opacity="100%" draw:stroke="solid" svg:stroke-width="0.02083in" svg:stroke-color="#caee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caeefb" draw:opacity="100%" draw:stroke="solid" svg:stroke-width="0.02083in" svg:stroke-color="#ff61e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custom-shape svg:x="0in" svg:y="0in" svg:width="13.33333in" svg:height="7.5in" draw:id="id63" draw:style-name="a383" draw:name="Rechthoek 5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568in" svg:y="1.66803in" svg:width="8.08197in" svg:height="2.08197in" draw:id="id64" draw:style-name="a386" draw:name="Rechthoek: afgeronde hoeken 3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5" draw:style-name="a392" draw:name="Tekstvak 4" svg:x="2.8448in" svg:y="2.35911in" svg:width="7.64374in" svg:height="0.60586in">
          <draw:text-box>
            <text:p text:style-name="a391" text:class-names="" text:cond-style-name=""><text:span text:style-name="a387" text:class-names="">Welkom tot de<text:s text:c="1"/></text:span><text:span text:style-name="a388" text:class-names="">TaalTrainerVoorKinderen</text:span><text:span text:style-name="a389" text:class-names=""><text:s text:c="1"/></text:span><text:span text:style-name="a390" text:class-names=""/></text:p>
          </draw:text-box>
          <svg:title/>
          <svg:desc/>
        </draw:frame>
      </draw:page>
      <draw:page draw:name="Slide2" draw:style-name="a393" draw:master-page-name="Master1-Layout1-title-Titeldia" presentation:presentation-page-layout-name="Master1-PPL1" draw:id="Slide-257">
        <draw:custom-shape svg:x="0in" svg:y="0in" svg:width="13.33333in" svg:height="7.5in" draw:id="id66" draw:style-name="a396" draw:name="Rechthoek 5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568in" svg:y="1.66803in" svg:width="8.08197in" svg:height="2.08197in" draw:id="id67" draw:style-name="a399" draw:name="Rechthoek: afgeronde hoeken 3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8" draw:style-name="a404" draw:name="Tekstvak 4" svg:x="2.8448in" svg:y="2.35911in" svg:width="7.64374in" svg:height="0.60586in">
          <draw:text-box>
            <text:p text:style-name="a403" text:class-names="" text:cond-style-name=""><text:span text:style-name="a400" text:class-names="">Welkom tot de<text:s text:c="1"/></text:span><text:span text:style-name="a401" text:class-names="">TaalTrainerVoorKinderen</text:span><text:span text:style-name="a402" text:class-names=""><text:s text:c="1"/></text:span></text:p>
          </draw:text-box>
          <svg:title/>
          <svg:desc/>
        </draw:frame>
        <draw:frame draw:id="id69" draw:style-name="a405" draw:name="Afbeelding 2" svg:x="11.98686in" svg:y="0in" svg:width="1.34648in" svg:height="1.3464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em Filee | Student</meta:initial-creator>
    <dc:creator>Sem Filee | Student</dc:creator>
    <meta:creation-date>2026-03-12T08:21:31Z</meta:creation-date>
    <dc:date>2026-03-12T08:32:24Z</dc:date>
    <meta:editing-cycles>1</meta:editing-cycles>
    <meta:editing-duration>PT653S</meta:editing-duration>
    <meta:document-statistic meta:paragraph-count="2" meta:word-count="8"/>
  </office:meta>
</office:document-meta>
</file>