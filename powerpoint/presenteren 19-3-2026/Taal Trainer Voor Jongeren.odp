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03">
      <style:drawing-page-properties draw:fill="solid" draw:fill-color="#eba3c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71e8e5" draw:opacity="100%" draw:stroke="solid" svg:stroke-width="0.02083in" svg:stroke-color="#a7337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ecebe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ecebe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eba3e8" draw:opacity="100%" draw:stroke="solid" svg:stroke-width="0.02083in" svg:stroke-color="#a7337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 style:parent-style-name="Graphics">
      <style:graphic-properties draw:fill="none" draw:stroke="non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 style:parent-style-name="Graphics">
      <style:graphic-properties draw:fill="none" draw:stroke="none"/>
    </style:style>
    <style:style style:family="graphic" style:name="a48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eba3e8" draw:opacity="100%" draw:stroke="solid" svg:stroke-width="0.02083in" svg:stroke-color="#a7337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eba3c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3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71e8e5" draw:opacity="100%" draw:stroke="solid" svg:stroke-width="0.02083in" svg:stroke-color="#a7337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28">
      <style:drawing-page-properties draw:fill="solid" draw:fill-color="#eba3c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 style:parent-style-name="Graphics">
      <style:graphic-properties draw:fill="none" draw:stroke="none"/>
    </style:style>
    <style:style style:family="paragraph" style:name="a5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gradient" draw:fill-gradient-name="a49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eba3e8" draw:opacity="100%" draw:stroke="solid" svg:stroke-width="0.02083in" svg:stroke-color="#a7337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 style:parent-style-name="Graphics">
      <style:graphic-properties draw:fill="none" draw:stroke="none"/>
    </style:style>
    <style:style style:family="paragraph" style:name="a4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ecebe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a73375" draw:opacity="100%" draw:stroke="solid" svg:stroke-width="0.02083in" svg:stroke-color="#0066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ecebe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ecebe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ecebe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eba3e8" draw:opacity="100%" draw:stroke="solid" svg:stroke-width="0.02083in" svg:stroke-color="#a7337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gradient" draw:fill-gradient-name="a55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4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6">
      <style:graphic-properties draw:fill="none" draw:stroke="non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eba3e8" draw:opacity="100%" draw:stroke="solid" svg:stroke-width="0.02083in" svg:stroke-color="#a7337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 style:parent-style-name="Graphics">
      <style:graphic-properties draw:fill="none" draw:stroke="none"/>
    </style:style>
    <style:style style:family="paragraph" style:name="a50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eba3c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eba3e8" draw:opacity="100%" draw:stroke="solid" svg:stroke-width="0.02083in" svg:stroke-color="#a7337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frame draw:id="id63" presentation:style-name="a384" draw:name="Titel 1" svg:x="3.55376in" svg:y="0.56496in" svg:width="6.22581in" svg:height="1.1208in" presentation:class="title" presentation:placeholder="false">
          <draw:text-box>
            <text:p text:style-name="a383" text:class-names="" text:cond-style-name=""><text:span text:style-name="a381" text:class-names="">Taal Trainer Voor Jongeren</text:span><text:span text:style-name="a382" text:class-names=""/></text:p>
          </draw:text-box>
          <svg:title/>
          <svg:desc/>
        </draw:frame>
        <draw:custom-shape svg:x="5.73522in" svg:y="3.80914in" svg:width="1.8629in" svg:height="0.81558in" draw:id="id64" draw:style-name="a387" draw:name="Rechthoek: afgeronde hoeken 4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5" presentation:style-name="a391" draw:name="Ondertitel 2" svg:x="6.07527in" svg:y="3.98225in" svg:width="1.1828in" svg:height="0.46937in" presentation:class="subtitle" presentation:placeholder="false">
          <draw:text-box>
            <text:p text:style-name="a390" text:class-names="" text:cond-style-name=""><text:span text:style-name="a388" text:class-names="">Levels</text:span><text:span text:style-name="a389" text:class-names=""/></text:p>
          </draw:text-box>
          <svg:title/>
          <svg:desc/>
        </draw:frame>
        <draw:frame draw:id="id66" draw:style-name="a392" draw:name="Afbeelding 6" svg:x="12.19355in" svg:y="0.73235in" svg:width="0.68333in" svg:height="0.71543in" style:rel-width="scale" style:rel-height="scale">
          <draw:image xlink:href="media/image1.png" xlink:type="simple" xlink:show="embed" xlink:actuate="onLoad"/>
          <svg:title/>
          <svg:desc/>
        </draw:frame>
        <draw:custom-shape svg:width="0.92473in" svg:height="0.53406in" draw:id="id67" draw:style-name="a395" draw:transform="translate(-0.46237in -0.26703in) rotate(-5.41824) translate(11.93529in 0.56496in)" draw:name="Rechthoek 7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402" draw:transform="translate(-0.46123in -0.20195in) rotate(-5.38493) translate(11.93529in 0.56496in)" draw:name="Tekstvak 9" svg:width="0.92246in" svg:height="0.40391in">
          <draw:text-box>
            <text:p text:style-name="a401" text:class-names="" text:cond-style-name=""><text:span text:style-name="a396" text:class-names="">Kijk</text:span><text:span text:style-name="a397" text:class-names=""><text:s text:c="1"/></text:span><text:span text:style-name="a398" text:class-names="">di</text:span><text:span text:style-name="a399" text:class-names="">t</text:span><text:span text:style-name="a400" text:class-names=""/></text:p>
          </draw:text-box>
          <svg:title/>
          <svg:desc/>
        </draw:frame>
      </draw:page>
      <draw:page draw:name="Slide2" draw:style-name="a403" draw:master-page-name="Master1-Layout2-obj-Titel-en-object" presentation:presentation-page-layout-name="Master1-PPL2" draw:id="Slide-257">
        <draw:custom-shape svg:x="3.31016in" svg:y="0.37176in" svg:width="6.78853in" svg:height="1.44965in" draw:id="id69" draw:style-name="a406" draw:name="Rechthoek: afgeronde hoeken 9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727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70" presentation:style-name="a410" draw:name="Titel 1" svg:x="0.91667in" svg:y="0.39931in" svg:width="11.5in" svg:height="1.44965in" presentation:class="title" presentation:placeholder="false">
          <draw:text-box>
            <text:p text:style-name="a409" text:class-names="" text:cond-style-name=""><text:span text:style-name="a407" text:class-names="">Welke taal wil je leren?</text:span><text:span text:style-name="a408" text:class-names=""/></text:p>
          </draw:text-box>
          <svg:title/>
          <svg:desc/>
        </draw:frame>
        <draw:frame draw:id="id71" presentation:style-name="a417" draw:name="Tijdelijke aanduiding voor inhoud 2" svg:x="0.91667in" svg:y="2.27047in" svg:width="11.5in" svg:height="0.47659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1" text:class-names="">Onze app heeft 2 mogelijkheden<text:s text:c="1"/></text:span><text:span text:style-name="a412" text:class-names="">kwa</text:span><text:span text:style-name="a413" text:class-names=""><text:s text:c="1"/>talen!</text:span><text:span text:style-name="a414" text:class-names=""/></text:p>
              </text:list-item>
            </text:list>
          </draw:text-box>
          <svg:title/>
          <svg:desc/>
        </draw:frame>
        <draw:frame draw:id="id72" draw:style-name="a418" draw:name="Afbeelding 4" svg:x="3.23298in" svg:y="3.64516in" svg:width="2.67717in" svg:height="1.78199in" style:rel-width="scale" style:rel-height="scale">
          <draw:image xlink:href="media/image2.jpg" xlink:type="simple" xlink:show="embed" xlink:actuate="onLoad"/>
          <svg:title/>
          <svg:desc/>
        </draw:frame>
        <draw:frame draw:id="id73" draw:style-name="a419" draw:name="Afbeelding 6" svg:x="7.42319in" svg:y="3.64516in" svg:width="2.67717in" svg:height="1.78617in" style:rel-width="scale" style:rel-height="scale">
          <draw:image xlink:href="media/image3.jpg" xlink:type="simple" xlink:show="embed" xlink:actuate="onLoad"/>
          <svg:title/>
          <svg:desc/>
        </draw:frame>
        <draw:frame draw:id="id74" draw:style-name="a423" draw:name="Tekstvak 7" svg:x="4.10815in" svg:y="5.55618in" svg:width="0.92681in" svg:height="0.40391in">
          <draw:text-box>
            <text:p text:style-name="a422" text:class-names="" text:cond-style-name=""><text:span text:style-name="a420" text:class-names="">Latijns</text:span><text:span text:style-name="a421" text:class-names=""/></text:p>
          </draw:text-box>
          <svg:title/>
          <svg:desc/>
        </draw:frame>
        <draw:frame draw:id="id75" draw:style-name="a427" draw:name="Tekstvak 8" svg:x="8.35888in" svg:y="5.57237in" svg:width="0.80578in" svg:height="0.40391in">
          <draw:text-box>
            <text:p text:style-name="a426" text:class-names="" text:cond-style-name=""><text:span text:style-name="a424" text:class-names="">Frans</text:span><text:span text:style-name="a425" text:class-names=""/></text:p>
          </draw:text-box>
          <svg:title/>
          <svg:desc/>
        </draw:frame>
      </draw:page>
      <draw:page draw:name="Slide3" draw:style-name="a428" draw:master-page-name="Master1-Layout2-obj-Titel-en-object" presentation:presentation-page-layout-name="Master1-PPL2" draw:id="Slide-258">
        <draw:custom-shape svg:x="6.08973in" svg:y="4.34878in" svg:width="1.15387in" svg:height="0.40391in" draw:id="id76" draw:style-name="a431" draw:name="Rechthoek: afgeronde hoeken 6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77" presentation:style-name="a435" draw:name="Titel 1" svg:x="0.91667in" svg:y="0.39931in" svg:width="11.5in" svg:height="1.44965in" presentation:class="title" presentation:placeholder="false">
          <draw:text-box>
            <text:p text:style-name="a434" text:class-names="" text:cond-style-name=""><text:span text:style-name="a432" text:class-names="">Je hebt Frans gekozen, laten we beginnen</text:span><text:span text:style-name="a433" text:class-names=""/></text:p>
          </draw:text-box>
          <svg:title/>
          <svg:desc/>
        </draw:frame>
        <draw:frame draw:id="id78" presentation:style-name="a442" draw:name="Tijdelijke aanduiding voor inhoud 2" svg:x="2.80779in" svg:y="3.56729in" svg:width="7.71774in" svg:height="0.67081in" presentation:class="outline" presentation:placeholder="false">
          <draw:text-box>
            <text:list text:style-name="a441">
              <text:list-item>
                <text:p text:style-name="a440" text:class-names="" text:cond-style-name=""><text:span text:style-name="a436" text:class-names="">Hoe goed denk je te zijn in de<text:s text:c="1"/></text:span><text:span text:style-name="a437" text:class-names="">F</text:span><text:span text:style-name="a438" text:class-names="">ranse taal?</text:span><text:span text:style-name="a439" text:class-names=""/></text:p>
              </text:list-item>
            </text:list>
          </draw:text-box>
          <svg:title/>
          <svg:desc/>
        </draw:frame>
        <draw:custom-shape svg:x="6.08973in" svg:y="5.18801in" svg:width="1.15387in" svg:height="0.40391in" draw:id="id79" draw:style-name="a445" draw:name="Rechthoek: afgeronde hoeken 7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80" draw:style-name="a449" draw:name="Tekstvak 3" svg:x="6.21858in" svg:y="4.34878in" svg:width="0.89617in" svg:height="0.40391in">
          <draw:text-box>
            <text:p text:style-name="a448" text:class-names="" text:cond-style-name=""><text:span text:style-name="a446" text:class-names="">Slecht</text:span><text:span text:style-name="a447" text:class-names=""/></text:p>
          </draw:text-box>
          <svg:title/>
          <svg:desc/>
        </draw:frame>
        <draw:custom-shape svg:x="6.08973in" svg:y="6.038in" svg:width="1.15387in" svg:height="0.40391in" draw:id="id81" draw:style-name="a452" draw:name="Rechthoek: afgeronde hoeken 8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82" draw:style-name="a455" draw:name="Tekstvak 4" svg:x="6.08973in" svg:y="5.2091in" svg:width="1.15387in" svg:height="0.40391in">
          <draw:text-box>
            <text:p text:style-name="a454" text:class-names="" text:cond-style-name=""><text:span text:style-name="a453" text:class-names="">Normaal</text:span></text:p>
          </draw:text-box>
          <svg:title/>
          <svg:desc/>
        </draw:frame>
        <draw:frame draw:id="id83" draw:style-name="a459" draw:name="Tekstvak 5" svg:x="6.26942in" svg:y="6.038in" svg:width="0.79449in" svg:height="0.40391in">
          <draw:text-box>
            <text:p text:style-name="a458" text:class-names="" text:cond-style-name=""><text:span text:style-name="a456" text:class-names="">Goed</text:span><text:span text:style-name="a457" text:class-names=""/></text:p>
          </draw:text-box>
          <svg:title/>
          <svg:desc/>
        </draw:frame>
        <draw:frame draw:id="id84" draw:style-name="a460" draw:name="Afbeelding 11" svg:x="5.43162in" svg:y="1.69108in" svg:width="2.47007in" svg:height="1.648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4" draw:style-name="a461" draw:master-page-name="Master1-Layout2-obj-Titel-en-object" presentation:presentation-page-layout-name="Master1-PPL2" draw:id="Slide-259">
        <draw:custom-shape svg:x="6.08973in" svg:y="4.34878in" svg:width="1.15387in" svg:height="0.40391in" draw:id="id85" draw:style-name="a464" draw:name="Rechthoek: afgeronde hoeken 6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86" presentation:style-name="a469" draw:name="Titel 1" svg:x="0.91667in" svg:y="0.39931in" svg:width="11.5in" svg:height="1.44965in" presentation:class="title" presentation:placeholder="false">
          <draw:text-box>
            <text:p text:style-name="a468" text:class-names="" text:cond-style-name=""><text:span text:style-name="a465" text:class-names="">Fran</text:span><text:span text:style-name="a466" text:class-names="">s</text:span><text:span text:style-name="a467" text:class-names=""/></text:p>
          </draw:text-box>
          <svg:title/>
          <svg:desc/>
        </draw:frame>
        <draw:frame draw:id="id87" presentation:style-name="a474" draw:name="Tijdelijke aanduiding voor inhoud 2" svg:x="2.80779in" svg:y="3.56729in" svg:width="7.71774in" svg:height="0.67081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0" text:class-names="">Vraag 1: Wat is “Huis” in het Frans?</text:span><text:span text:style-name="a471" text:class-names=""/></text:p>
              </text:list-item>
            </text:list>
          </draw:text-box>
          <svg:title/>
          <svg:desc/>
        </draw:frame>
        <draw:custom-shape svg:x="6.08973in" svg:y="5.18801in" svg:width="1.15387in" svg:height="0.40391in" draw:id="id88" draw:style-name="a477" draw:name="Rechthoek: afgeronde hoeken 7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89" draw:style-name="a481" draw:name="Tekstvak 3" svg:x="6.16862in" svg:y="4.34878in" svg:width="0.99609in" svg:height="0.40391in">
          <draw:text-box>
            <text:p text:style-name="a480" text:class-names="" text:cond-style-name=""><text:span text:style-name="a478" text:class-names="">Maison</text:span><text:span text:style-name="a479" text:class-names=""/></text:p>
          </draw:text-box>
          <svg:title/>
          <svg:desc/>
        </draw:frame>
        <draw:custom-shape svg:x="6.08973in" svg:y="6.038in" svg:width="1.15387in" svg:height="0.40391in" draw:id="id90" draw:style-name="a484" draw:name="Rechthoek: afgeronde hoeken 8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91" draw:style-name="a488" draw:name="Tekstvak 4" svg:x="6.17913in" svg:y="5.2091in" svg:width="0.97506in" svg:height="0.40391in">
          <draw:text-box>
            <text:p text:style-name="a487" text:class-names="" text:cond-style-name=""><text:span text:style-name="a485" text:class-names="">Naison</text:span><text:span text:style-name="a486" text:class-names=""/></text:p>
          </draw:text-box>
          <svg:title/>
          <svg:desc/>
        </draw:frame>
        <draw:frame draw:id="id92" draw:style-name="a492" draw:name="Tekstvak 5" svg:x="6.17664in" svg:y="6.038in" svg:width="0.98003in" svg:height="0.40391in">
          <draw:text-box>
            <text:p text:style-name="a491" text:class-names="" text:cond-style-name=""><text:span text:style-name="a489" text:class-names="">Maizon</text:span><text:span text:style-name="a490" text:class-names=""/></text:p>
          </draw:text-box>
          <svg:title/>
          <svg:desc/>
        </draw:frame>
        <draw:frame draw:id="id93" draw:style-name="a493" draw:name="Afbeelding 11" svg:x="5.43162in" svg:y="1.69108in" svg:width="2.47007in" svg:height="1.648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6" draw:style-name="a495" draw:master-page-name="Master1-Layout2-obj-Titel-en-object" presentation:presentation-page-layout-name="Master1-PPL2" draw:id="Slide-261">
        <draw:frame draw:id="id94" presentation:style-name="a499" draw:name="Titel 1" svg:x="0.91667in" svg:y="0.14124in" svg:width="11.5in" svg:height="1.44965in" presentation:class="title" presentation:placeholder="false">
          <draw:text-box>
            <text:p text:style-name="a498" text:class-names="" text:cond-style-name=""><text:span text:style-name="a496" text:class-names="">Eisen</text:span><text:span text:style-name="a497" text:class-names=""/></text:p>
          </draw:text-box>
          <svg:title/>
          <svg:desc/>
        </draw:frame>
        <draw:frame draw:id="id95" presentation:style-name="a549" draw:name="Tijdelijke aanduiding voor inhoud 2" svg:x="0.91667in" svg:y="1.99653in" svg:width="11.5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0" text:class-names="">Velle</text:span><text:span text:style-name="a501" text:class-names=""><text:s text:c="1"/>kleuren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Doelgroep kinderen</text:span></text:p>
              </text:list-item>
            </text:list>
            <text:list text:style-name="a514">
              <text:list-item>
                <text:p text:style-name="a513" text:class-names="" text:cond-style-name=""><text:span text:style-name="a507" text:class-names="">Frans</text:span><text:span text:style-name="a508" text:class-names=""><text:s text:c="1"/></text:span><text:span text:style-name="a509" text:class-names="">en</text:span><text:span text:style-name="a510" text:class-names=""><text:s text:c="1"/></text:span><text:span text:style-name="a511" text:class-names="">latijns</text:span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Inlog systeem</text:span></text:p>
              </text:list-item>
            </text:list>
            <text:list text:style-name="a529">
              <text:list-item>
                <text:p text:style-name="a528" text:class-names="" text:cond-style-name=""><text:span text:style-name="a518" text:class-names="">Naam:</text:span><text:span text:style-name="a519" text:class-names=""><text:s text:c="1"/></text:span><text:span text:style-name="a520" text:class-names="">Taal</text:span><text:span text:style-name="a521" text:class-names=""><text:s text:c="1"/></text:span><text:span text:style-name="a522" text:class-names="">Trainer</text:span><text:span text:style-name="a523" text:class-names=""><text:s text:c="1"/></text:span><text:span text:style-name="a524" text:class-names="">Voor</text:span><text:span text:style-name="a525" text:class-names=""><text:s text:c="1"/></text:span><text:span text:style-name="a526" text:class-names="">Jongeren</text:span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Blauw en roze</text:span></text:p>
              </text:list-item>
            </text:list>
            <text:list text:style-name="a536">
              <text:list-item>
                <text:p text:style-name="a535" text:class-names="" text:cond-style-name=""><text:span text:style-name="a533" text:class-names="">Druk</text:span><text:span text:style-name="a534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Uniek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Moeilijkheidsgraden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Level systeem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Overzichtelijk</text:span></text:p>
              </text:list-item>
            </text:list>
          </draw:text-box>
          <svg:title/>
          <svg:desc/>
        </draw:frame>
      </draw:page>
      <draw:page draw:name="Slide5" draw:style-name="a551" draw:master-page-name="Master1-Layout2-obj-Titel-en-object" presentation:presentation-page-layout-name="Master1-PPL2" draw:id="Slide-260">
        <draw:frame draw:id="id96" presentation:style-name="a555" draw:name="Titel 1" svg:x="0.91667in" svg:y="0.39931in" svg:width="11.5in" svg:height="1.44965in" presentation:class="title" presentation:placeholder="false">
          <draw:text-box>
            <text:p text:style-name="a554" text:class-names="" text:cond-style-name=""><text:span text:style-name="a552" text:class-names="">Moodboard</text:span><text:span text:style-name="a553" text:class-names=""/></text:p>
          </draw:text-box>
          <svg:title/>
          <svg:desc/>
        </draw:frame>
        <draw:frame draw:id="id97" presentation:style-name="a556" draw:name="Tijdelijke aanduiding voor inhoud 4" svg:x="4.30303in" svg:y="0.39931in" svg:width="4.72727in" svg:height="6.72109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494" draw:style="linear" draw:angle="0" draw:start-color="#78c3e9" draw:end-color="#74c4e9" draw:start-intensity="100%" draw:end-intensity="100%"/>
    <draw:gradient draw:name="a550" draw:style="linear" draw:angle="0" draw:start-color="#78c3e9" draw:end-color="#74c4e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en om de tekststijl van het model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en om de tekststijl van het model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en om de tekststijl van het model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en om de tekststijl van het model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en om de tekststijl van het model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en om de tekststijl van het model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en om de tekststijl van het model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Wouter Duijn | Student</meta:initial-creator>
    <dc:creator>Wouter Duijn | Student</dc:creator>
    <meta:creation-date>2026-03-19T08:14:06Z</meta:creation-date>
    <dc:date>2026-03-19T10:01:31Z</dc:date>
    <meta:editing-cycles>1</meta:editing-cycles>
    <meta:editing-duration>PT6445S</meta:editing-duration>
    <meta:document-statistic meta:paragraph-count="30" meta:word-count="87"/>
  </office:meta>
</office:document-meta>
</file>