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53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169e1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draw:stroke="non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c0c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d87093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frame draw:id="id63" presentation:style-name="a338" draw:name="Titel 1" svg:x="1.66667in" svg:y="0.44444in" svg:width="10in" svg:height="2.61111in" presentation:class="title" presentation:placeholder="false">
          <draw:text-box>
            <text:p text:style-name="a337" text:class-names="" text:cond-style-name=""><text:span text:style-name="a336" text:class-names="">Taal Trainer Voor Jongeren</text:span></text:p>
          </draw:text-box>
          <svg:title/>
          <svg:desc/>
        </draw:frame>
        <draw:frame draw:id="id64" presentation:style-name="a348" draw:name="Ondertitel 2" svg:x="1.66667in" svg:y="3.93924in" svg:width="10in" svg:height="1.81076in" presentation:class="subtitle" presentation:placeholder="false">
          <draw:text-box>
            <text:list text:style-name="a341">
              <text:list-item>
                <text:p text:style-name="a340" text:class-names="" text:cond-style-name=""><text:span text:style-name="a339" text:class-names="">Sem</text:span></text:p>
              </text:list-item>
            </text:list>
            <text:list text:style-name="a344">
              <text:list-item>
                <text:p text:style-name="a343" text:class-names="" text:cond-style-name=""><text:span text:style-name="a342" text:class-names="">Jordy</text:span></text:p>
              </text:list-item>
            </text:list>
            <text:list text:style-name="a347">
              <text:list-item>
                <text:p text:style-name="a346" text:class-names="" text:cond-style-name=""><text:span text:style-name="a345" text:class-names="">Wouter</text:span></text:p>
              </text:list-item>
            </text:list>
          </draw:text-box>
          <svg:title/>
          <svg:desc/>
        </draw:frame>
      </draw:page>
      <draw:page draw:name="Slide4" draw:style-name="a349" draw:master-page-name="Master1-Layout2-obj-Titel-en-object" presentation:presentation-page-layout-name="Master1-PPL2" draw:id="Slide-259">
        <draw:frame draw:id="id65" presentation:style-name="a352" draw:name="Titel 1" svg:x="0.91667in" svg:y="0.39931in" svg:width="11.5in" svg:height="1.44965in" presentation:class="title" presentation:placeholder="false">
          <draw:text-box>
            <text:p text:style-name="a351" text:class-names="" text:cond-style-name=""><text:span text:style-name="a350" text:class-names="">Inleiding</text:span></text:p>
          </draw:text-box>
          <svg:title/>
          <svg:desc/>
        </draw:frame>
        <draw:frame draw:id="id66" presentation:style-name="a374" draw:name="Tijdelijke aanduiding voor inhoud 2" svg:x="0.91667in" svg:y="1.99653in" svg:width="11.5in" svg:height="4.75868in" presentation:class="outline" presentation:placeholder="false">
          <draw:text-box>
            <text:list text:style-name="a355">
              <text:list-item>
                <text:p text:style-name="a354" text:class-names="" text:cond-style-name=""><text:span text:style-name="a353" text:class-names="">Inleiding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Taakverdeling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Eisen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Moodboard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Flowchart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Demonstratie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en-object" presentation:presentation-page-layout-name="Master1-PPL2" draw:id="Slide-262">
        <draw:frame draw:id="id67" presentation:style-name="a378" draw:name="Titel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Taakverdeling</text:span></text:p>
          </draw:text-box>
          <svg:title/>
          <svg:desc/>
        </draw:frame>
        <draw:frame draw:id="id68" presentation:style-name="a409" draw:name="Tijdelijke aanduiding voor inhoud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Sem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Login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Backend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Jordy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Html opdracht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Documentatie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Wouter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CS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Presentatie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Moodboard - flowchart</text:span></text:p>
              </text:list-item>
            </text:list>
          </draw:text-box>
          <svg:title/>
          <svg:desc/>
        </draw:frame>
      </draw:page>
      <draw:page draw:name="Slide3" draw:style-name="a410" draw:master-page-name="Master1-Layout2-obj-Titel-en-object" presentation:presentation-page-layout-name="Master1-PPL2" draw:id="Slide-258">
        <draw:frame draw:id="id69" presentation:style-name="a413" draw:name="Titel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1" text:class-names="">Eisen</text:span></text:p>
          </draw:text-box>
          <svg:title/>
          <svg:desc/>
        </draw:frame>
        <draw:frame draw:id="id70" presentation:style-name="a450" draw:name="Tijdelijke aanduiding voor inhoud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Felle kleuren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Doelgroep: kinderen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Frans en Latijn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Inlog systeem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Naam: Taal Trainer Voor Jongere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Blauw en roze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Druk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nloggen wanneer je wilt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Uniek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Level systeem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Multiple choice vragen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overzichtelijk</text:span></text:p>
              </text:list-item>
            </text:list>
          </draw:text-box>
          <svg:title/>
          <svg:desc/>
        </draw:frame>
      </draw:page>
      <draw:page draw:name="Slide2" draw:style-name="a451" draw:master-page-name="Master1-Layout2-obj-Titel-en-object" presentation:presentation-page-layout-name="Master1-PPL2" draw:id="Slide-257">
        <draw:frame draw:id="id71" presentation:style-name="a454" draw:name="Titel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2" text:class-names="">Moodboard</text:span></text:p>
          </draw:text-box>
          <svg:title/>
          <svg:desc/>
        </draw:frame>
        <draw:frame draw:id="id72" presentation:style-name="a455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  <draw:frame draw:id="id73" draw:style-name="a456" draw:name="Tijdelijke aanduiding voor inhoud 4" svg:x="4.30303in" svg:y="0.38946in" svg:width="4.72727in" svg:height="6.7210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57" draw:master-page-name="Master1-Layout2-obj-Titel-en-object" presentation:presentation-page-layout-name="Master1-PPL2" draw:id="Slide-260">
        <draw:frame draw:id="id74" presentation:style-name="a460" draw:name="Titel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8" text:class-names="">Flowchart</text:span></text:p>
          </draw:text-box>
          <svg:title/>
          <svg:desc/>
        </draw:frame>
        <draw:frame draw:id="id75" presentation:style-name="a461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  <draw:frame draw:id="id76" draw:style-name="a462" draw:name="Afbeelding 4" svg:x="3.86628in" svg:y="1.17278in" svg:width="9.09502in" svg:height="5.9279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463" draw:master-page-name="Master1-Layout2-obj-Titel-en-object" presentation:presentation-page-layout-name="Master1-PPL2" draw:id="Slide-261">
        <draw:frame draw:id="id77" presentation:style-name="a466" draw:name="Titel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4" text:class-names="">Demonstratie</text:span></text:p>
          </draw:text-box>
          <svg:title/>
          <svg:desc/>
        </draw:frame>
        <draw:frame draw:id="id78" presentation:style-name="a467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-3-2026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-3-2026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-3-2026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-3-2026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-3-2026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-3-2026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-3-2026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-3-2026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-3-2026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-3-2026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-3-2026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-3-2026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Wouter Duijn | Student</meta:initial-creator>
    <dc:creator>Wouter Duijn | Student</dc:creator>
    <meta:creation-date>2026-03-24T08:38:41Z</meta:creation-date>
    <dc:date>2026-03-24T09:55:01Z</dc:date>
    <meta:editing-cycles>2</meta:editing-cycles>
    <meta:editing-duration>PT4523S</meta:editing-duration>
    <meta:document-statistic meta:paragraph-count="38" meta:word-count="63"/>
  </office:meta>
</office:document-meta>
</file>